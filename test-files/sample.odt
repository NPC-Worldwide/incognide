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This is a sample ODT test file for Incognide.</text:p>
      <text:p>It contains multiple paragraphs to verify ODT rendering.</text:p>
      <text:p>Second paragraph here.</text:p>
      <text:p>Third paragraph with some content.</text:p>
    </office:text>
  </office:body>
</office:document-content>
</file>

<file path=styles.xml><?xml version="1.0" encoding="utf-8"?>
<office:document-styles xmlns:office="urn:oasis:names:tc:opendocument:xmlns:office:1.0"/>
</file>

<file path=meta.xml><?xml version="1.0" encoding="utf-8"?>
<office:document-meta xmlns:office="urn:oasis:names:tc:opendocument:xmlns:office:1.0" xmlns:meta="urn:oasis:names:tc:opendocument:xmlns:meta:1.0">
  <meta:creation-date>2026-06-27T00:00:00</meta:creation-date>
</office:document-meta>
</file>